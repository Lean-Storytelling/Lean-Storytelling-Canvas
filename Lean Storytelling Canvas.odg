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900000253AB85C9FE.png" manifest:media-type="image/png"/>
  <manifest:file-entry manifest:full-path="Pictures/100B72B70000740400005208D8724F1C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9.699cm" svg:height="20.999cm" svg:x="0cm" svg:y="0cm">
          <draw:image xlink:href="Pictures/100B72B70000740400005208D8724F1C.svg" xlink:type="simple" xlink:show="embed" xlink:actuate="onLoad" draw:mime-type="image/svg+xml">
            <text:p/>
          </draw:image>
          <draw:image xlink:href="Pictures/100000010000034900000253AB85C9FE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3cm" fo:margin-bottom="1.03cm" fo:margin-left="1.03cm" fo:margin-right="1.03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object-count="1"/>
    <meta:generator>Collabora_Office/25.04.7.2$Linux_X86_64 LibreOffice_project/e8df584b5f86eb5ad5911ecc76fca16e80c8c726</meta:generator>
  </office:meta>
</office:document-meta>
</file>